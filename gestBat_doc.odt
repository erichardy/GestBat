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fr" fo:country="FR" officeooo:rsid="0005412c" officeooo:paragraph-rsid="0005412c"/>
    </style:style>
    <style:style style:name="P2" style:family="paragraph" style:parent-style-name="Standard">
      <style:text-properties fo:language="fr" fo:country="FR" officeooo:rsid="0005eeee" officeooo:paragraph-rsid="0005eeee"/>
    </style:style>
    <style:style style:name="P3" style:family="paragraph" style:parent-style-name="Standard">
      <style:text-properties fo:language="fr" fo:country="FR" officeooo:rsid="000bccd1" officeooo:paragraph-rsid="000bccd1"/>
    </style:style>
    <style:style style:name="P4" style:family="paragraph" style:parent-style-name="Standard">
      <style:text-properties fo:language="fr" fo:country="FR" officeooo:rsid="00105323" officeooo:paragraph-rsid="00105323"/>
    </style:style>
    <style:style style:name="P5" style:family="paragraph" style:parent-style-name="Standard">
      <style:text-properties fo:language="fr" fo:country="FR" officeooo:rsid="000a1ac5" officeooo:paragraph-rsid="000a1ac5"/>
    </style:style>
    <style:style style:name="P6" style:family="paragraph" style:parent-style-name="Standard">
      <style:text-properties fo:language="fr" fo:country="FR"/>
    </style:style>
    <style:style style:name="P7" style:family="paragraph" style:parent-style-name="Title">
      <style:text-properties fo:language="fr" fo:country="FR"/>
    </style:style>
    <style:style style:name="P8" style:family="paragraph" style:parent-style-name="Heading_20_3">
      <style:text-properties fo:language="fr" fo:country="FR"/>
    </style:style>
    <style:style style:name="P9" style:family="paragraph" style:parent-style-name="Standard" style:list-style-name="L1">
      <style:text-properties fo:language="fr" fo:country="FR" officeooo:rsid="0005412c" officeooo:paragraph-rsid="0005412c"/>
    </style:style>
    <style:style style:name="P10" style:family="paragraph" style:parent-style-name="Standard" style:list-style-name="L2">
      <style:text-properties fo:language="fr" fo:country="FR" officeooo:rsid="0006a15a" officeooo:paragraph-rsid="0006a15a"/>
    </style:style>
    <style:style style:name="P11" style:family="paragraph" style:parent-style-name="Standard" style:list-style-name="L2">
      <style:text-properties fo:language="fr" fo:country="FR" officeooo:rsid="00088bc4" officeooo:paragraph-rsid="00088bc4"/>
    </style:style>
    <style:style style:name="P12" style:family="paragraph" style:parent-style-name="Standard" style:list-style-name="L3">
      <style:text-properties fo:language="fr" fo:country="FR" officeooo:rsid="000db1a7" officeooo:paragraph-rsid="000db1a7"/>
    </style:style>
    <style:style style:name="P13" style:family="paragraph" style:parent-style-name="Standard" style:list-style-name="L3">
      <style:text-properties fo:language="fr" fo:country="FR" officeooo:rsid="00105323" officeooo:paragraph-rsid="00105323"/>
    </style:style>
    <style:style style:name="P14" style:family="paragraph" style:parent-style-name="Standard" style:list-style-name="L4">
      <style:text-properties fo:language="fr" fo:country="FR" officeooo:rsid="001131b5" officeooo:paragraph-rsid="001131b5"/>
    </style:style>
    <style:style style:name="P15" style:family="paragraph" style:parent-style-name="Standard" style:list-style-name="L5"/>
    <style:style style:name="T1" style:family="text">
      <style:text-properties officeooo:rsid="00088bc4"/>
    </style:style>
    <style:style style:name="T2" style:family="text">
      <style:text-properties officeooo:rsid="000bc15f"/>
    </style:style>
    <style:style style:name="T3" style:family="text">
      <style:text-properties officeooo:rsid="000f33da"/>
    </style:style>
    <style:style style:name="T4" style:family="text">
      <style:text-properties officeooo:rsid="00105323"/>
    </style:style>
    <style:style style:name="T5" style:family="text">
      <style:text-properties fo:language="fr" fo:country="FR" officeooo:rsid="000a1ac5"/>
    </style:style>
    <style:style style:name="T6" style:family="text">
      <style:text-properties officeooo:rsid="00115025"/>
    </style:style>
    <style:style style:name="T7" style:family="text">
      <style:text-properties officeooo:rsid="0016aa7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ystème d’aide à la mise en charge des batteries de VAE</text:p>
      <text:p text:style-name="P1"/>
      <text:p text:style-name="P1"/>
      <text:p text:style-name="P1"/>
      <text:h text:style-name="P8" text:outline-level="3">Fonctionnalités</text:h>
      <text:p text:style-name="P1"/>
      <text:list text:style-name="L1">
        <text:list-item>
          <text:p text:style-name="P9">boîtier connecté au secteur en permanence mais ne tirant aucun courant tant qu’il n’est pas en cours d’utilisation</text:p>
        </text:list-item>
        <text:list-item>
          <text:p text:style-name="P9">branchement de la batterie sur le boîtier</text:p>
        </text:list-item>
        <text:list-item>
          <text:p text:style-name="P9">configuration du délai de début de la charge. Le délai par défaut étant de 30mn</text:p>
        </text:list-item>
        <text:list-item>
          <text:p text:style-name="P9">démarrage de la recharge après un délai déterminé</text:p>
        </text:list-item>
        <text:list-item>
          <text:p text:style-name="P9">détection en temps réel du courant secteur</text:p>
        </text:list-item>
        <text:list-item>
          <text:p text:style-name="P9">coupure de l’alimentation de l’ensemble quand le courant détecté est au niveau de celui qui correspond à l’arrêt de la charge (le chargeur, même quand la charge est terminée, continue de tirer du courant)</text:p>
        </text:list-item>
      </text:list>
      <text:p text:style-name="P2"/>
      <text:h text:style-name="P8" text:outline-level="3">Usage</text:h>
      <text:list text:style-name="L2">
        <text:list-item>
          <text:p text:style-name="P10">on branche la batterie sur le boîtier</text:p>
        </text:list-item>
        <text:list-item>
          <text:p text:style-name="P10">on appuie sur le<text:span text:style-name="T2">(s)</text:span> bouton<text:span text:style-name="T2">(s)</text:span> de démarrage pendant quelques secondes le temps que le microcontrôleur active le<text:span text:style-name="T2">(s)</text:span> relai<text:span text:style-name="T2">(s)</text:span> pour l’alimentation générale ; <text:span text:style-name="T1">un son et une LED signalent que le démarrage du système est effectif</text:span></text:p>
        </text:list-item>
        <text:list-item>
          <text:p text:style-name="P10">réglage du délai de début de charge</text:p>
        </text:list-item>
        <text:list-item>
          <text:p text:style-name="P11">la charge débute <text:span text:style-name="T2">quand le</text:span> délai donné <text:span text:style-name="T2">est expiré</text:span></text:p>
        </text:list-item>
        <text:list-item>
          <text:p text:style-name="P11">fin de charge : émission éventuelle d’<text:span text:style-name="T2">un</text:span> son pour signaler la fin de la charge</text:p>
        </text:list-item>
        <text:list-item>
          <text:p text:style-name="P11">arrêt automatique complet du système provoqué par le microcontrôleur qui actionne le<text:span text:style-name="T2">(s)</text:span> relai<text:span text:style-name="T2">(s)</text:span> général/<text:span text:style-name="T2">aux</text:span> <text:span text:style-name="T2">qui</text:span> coupe<text:span text:style-name="T2">(nt)</text:span> toute l’alimentation</text:p>
        </text:list-item>
      </text:list>
      <text:p text:style-name="P1"/>
      <text:p text:style-name="P1"/>
      <text:p text:style-name="P1"/>
      <text:p text:style-name="P1"/>
      <text:p text:style-name="P1"/>
      <text:h text:style-name="P8" text:outline-level="3">Fonctionnalités implémentées dans le Raspberry Pi Pico</text:h>
      <text:p text:style-name="P3"/>
      <text:list text:style-name="L3">
        <text:list-item>
          <text:p text:style-name="P12">Au démar<text:span text:style-name="T4">r</text:span>age : activer les 2 relais de l’alimentation générale <text:span text:style-name="T4">et envoyer un b</text:span><text:span text:style-name="T6">ee</text:span><text:span text:style-name="T4">p quand le système est déma</text:span><text:span text:style-name="T6">r</text:span><text:span text:style-name="T4">ré</text:span></text:p>
        </text:list-item>
        <text:list-item>
          <text:p text:style-name="P12">gérer la configuration du délai de démarrage de la charge. Cette config peut être faite soit avec des boutons préconfigurés (30mn, 20mn, 10mn, 0mn), ou des appuis successifs sur un bouton ‘+’ et un bouton ‘-’, ou avec un rotatif + clic pour valider</text:p>
        </text:list-item>
        <text:list-item>
          <text:p text:style-name="P12">gérer l’affichage sur un écran à cristaux liquide<text:span text:style-name="T3">s</text:span></text:p>
        </text:list-item>
        <text:list-item>
          <text:p text:style-name="P12">activer le relais qui permet l’alimentation du chargeur</text:p>
        </text:list-item>
        <text:list-item>
          <text:p text:style-name="P12">calculer le courant</text:p>
        </text:list-item>
        <text:list-item>
          <text:p text:style-name="P13">couper le relais d’alimentation du chargeur</text:p>
        </text:list-item>
      </text:list>
      <text:p text:style-name="P4"/>
      <text:p text:style-name="P4"/>
      <text:p text:style-name="P4"><text:soft-page-break/>Fonctions à implémenter :</text:p>
      <text:list text:style-name="L4">
        <text:list-item>
          <text:p text:style-name="P14">activer et dé-activer un relais SSR</text:p>
        </text:list-item>
        <text:list-item>
          <text:p text:style-name="P14">émettre un BEEP ou autre son</text:p>
        </text:list-item>
        <text:list-item>
          <text:p text:style-name="P14">affichage sur écran cristaux liquides :<text:line-break/><text:a xlink:type="simple" xlink:href="https://www.freva.com/fr/connecter-un-ecran-lcd-a-un-raspberry-pi-pico/?srsltid=AfmBOoowKH5MYUCflemAkAv3o5hQ_voaQmrK15w0YiO4GPY88iCO0XUz" text:style-name="Internet_20_link" text:visited-style-name="Visited_20_Internet_20_Link">https://www.freva.com/fr/connecter-un-ecran-lcd-a-un-raspberry-pi-pico/?srsltid=AfmBOoowKH5MYUCflemAkAv3o5hQ_voaQmrK15w0YiO4GPY88iCO0XUz</text:a><text:line-break/><text:span text:style-name="T7">ou<text:line-break/></text:span><text:a xlink:type="simple" xlink:href="https://www.youtube.com/watch?v=bXLgxEcT1QU&amp;ab_channel=NerdCave" text:style-name="Internet_20_link" text:visited-style-name="Visited_20_Internet_20_Link"><text:span text:style-name="T7">https://www.youtube.com/watch?v=bXLgxEcT1QU&amp;ab_channel=NerdCave</text:span></text:a><text:span text:style-name="T7"><text:line-break/></text:span></text:p>
        </text:list-item>
        <text:list-item>
          <text:p text:style-name="P14">acquérir des données :en provenance du transformateur de courant et du « capteur » de tension</text:p>
        </text:list-item>
        <text:list-item>
          <text:p text:style-name="P14">étalonner les mesures : courant et tension</text:p>
        </text:list-item>
        <text:list-item>
          <text:p text:style-name="P14"><text:line-break/></text:p>
        </text:list-item>
      </text:list>
      <text:p text:style-name="P1"/>
      <text:p text:style-name="P1"/>
      <text:p text:style-name="P1"/>
      <text:p text:style-name="P1"/>
      <text:p text:style-name="P1"/>
      <text:p text:style-name="P1"/>
      <text:p text:style-name="P1"/>
      <text:p text:style-name="P1"/>
      <text:p text:style-name="P1"/>
      <text:p text:style-name="P1"/>
      <text:p text:style-name="P5">Annexe 1 : diverses pistes</text:p>
      <text:p text:style-name="P6"/>
      <text:list text:style-name="L5">
        <text:list-item>
          <text:p text:style-name="P15"><text:span text:style-name="T5">Peut-être le « Horloge en temps réel (RTC) Microchip série I2C, SOIC, 5.5 V, 64B RAM, 8 broches » (à </text:span><text:a xlink:type="simple" xlink:href="https://ma.rsdelivers.com/product/microchip/mcp79410-i/sn/horloge-en-temps-reel-rtc-microchip-serie-i2c-soic/7263949" text:style-name="Internet_20_link" text:visited-style-name="Visited_20_Internet_20_Link"><text:span text:style-name="T5">https://ma.rsdelivers.com/product/microchip/mcp79410-i/sn/horloge-en-temps-reel-rtc-microchip-serie-i2c-soic/7263949</text:span></text:a><text:span text:style-name="T5">)<text:line-break/>pour, éventuellement, stocker les opérations de charge avec les dates…</text:span></text:p>
        </text:list-item>
      </text:list>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9T11:43:36.798900595</meta:creation-date>
    <dc:date>2025-08-13T00:46:24.739765847</dc:date>
    <meta:editing-duration>PT1H44M14S</meta:editing-duration>
    <meta:editing-cycles>14</meta:editing-cycles>
    <meta:generator>LibreOffice/24.2.7.2$Linux_X86_64 LibreOffice_project/420$Build-2</meta:generator>
    <meta:document-statistic meta:table-count="0" meta:image-count="0" meta:object-count="0" meta:page-count="2" meta:paragraph-count="31" meta:word-count="397" meta:character-count="2560" meta:non-whitespace-character-count="2216"/>
  </office:meta>
</office:document-meta>
</file>